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A0000036674183820.png" manifest:media-type="image/png"/>
  <manifest:file-entry manifest:full-path="Pictures/1000325F000052C9000052C9D27F875F.svg" manifest:media-type="image/svg+xml"/>
  <manifest:file-entry manifest:full-path="Pictures/10000001000002C3000002C3E0EA2188.png" manifest:media-type="image/png"/>
  <manifest:file-entry manifest:full-path="Pictures/10000D7000001A90000020A985658AC8.svg" manifest:media-type="image/svg+xml"/>
  <manifest:file-entry manifest:full-path="Pictures/10002B8700007C20000014C63E427498.svg" manifest:media-type="image/svg+xml"/>
  <manifest:file-entry manifest:full-path="Pictures/1000000000000540000003A63FB8ECCC.png" manifest:media-type="image/png"/>
  <manifest:file-entry manifest:full-path="Pictures/10000001000001010000013C850A5C9B.png" manifest:media-type="image/png"/>
  <manifest:file-entry manifest:full-path="Pictures/10000001000004B1000000C9A3BBEE2B.png" manifest:media-type="image/png"/>
  <manifest:file-entry manifest:full-path="Pictures/100000010000017D00000100562B3A31.png" manifest:media-type="image/png"/>
  <manifest:file-entry manifest:full-path="Pictures/100000000000053F000003A569214397.png" manifest:media-type="image/png"/>
  <manifest:file-entry manifest:full-path="Pictures/1000000000000491000003BD1CD1FC83.png" manifest:media-type="image/png"/>
  <manifest:file-entry manifest:full-path="Pictures/1000000000000696000001F10E38A727.png" manifest:media-type="image/png"/>
  <manifest:file-entry manifest:full-path="Pictures/100000000000022C00000372CE27ED18.png" manifest:media-type="image/png"/>
  <manifest:file-entry manifest:full-path="Pictures/1000000000000694000002A317B21AF8.png" manifest:media-type="image/png"/>
  <manifest:file-entry manifest:full-path="Pictures/100000000000054E000001D8DB4D8B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_31__5f_Default-title">
      <style:graphic-properties fo:min-height="3.473cm" loext:decorative="false"/>
      <style:paragraph-properties style:writing-mode="lr-tb"/>
    </style:style>
    <style:style style:name="pr2" style:family="presentation" style:parent-style-name="_31__5f_Default-subtitle">
      <style:graphic-properties draw:fill-color="#ffffff" fo:min-height="0.869cm" loext:decorative="false"/>
      <style:paragraph-properties style:writing-mode="lr-tb"/>
    </style:style>
    <style:style style:name="pr3" style:family="presentation" style:parent-style-name="_31__5f_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left" fo:min-height="5.209cm" loext:decorative="false"/>
      <style:paragraph-properties style:writing-mode="lr-tb"/>
    </style:style>
    <style:style style:name="pr8" style:family="presentation" style:parent-style-name="_32__5f_Default-title">
      <style:graphic-properties draw:textarea-horizontal-align="left" fo:min-height="2.629cm" loext:decorative="false"/>
      <style:paragraph-properties style:writing-mode="lr-tb"/>
    </style:style>
    <style:style style:name="pr9" style:family="presentation" style:parent-style-name="_32__5f_Default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8.681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074cm" style:use-optimal-column-width="false"/>
    </style:style>
    <style:style style:name="co2" style:family="table-column">
      <style:table-column-properties style:column-width="4.161cm" style:use-optimal-column-width="false"/>
    </style:style>
    <style:style style:name="co3" style:family="table-column">
      <style:table-column-properties style:column-width="3.37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3.355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808080"/>
    </style:style>
    <style:style style:name="ce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fo:font-size="13pt" style:font-size-asian="13pt" style:font-size-complex="13pt"/>
    </style:style>
    <style:style style:name="ce5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</style:style>
    <style:style style:name="ce6" style:family="table-cell">
      <loext:graphic-properties draw:fill="solid" draw:fill-color="#77bc65"/>
      <style:paragraph-properties fo:border-left="0.28pt solid #000000" fo:border-right="none" fo:border-top="none" fo:border-bottom="0.28pt solid #000000"/>
    </style:style>
    <style:style style:name="ce7" style:family="table-cell">
      <loext:graphic-properties draw:fill="solid" draw:fill-color="#808080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fill="solid" draw:fill-color="#77bc65"/>
      <style:paragraph-properties fo:border-left="none" fo:border-right="0.28pt solid #000000" fo:border-top="0.28pt solid #000000" fo:border-bottom="none"/>
    </style:style>
    <style:style style:name="ce9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  <style:text-properties fo:font-size="13pt" style:font-size-asian="13pt" style:font-size-complex="13pt"/>
    </style:style>
    <style:style style:name="ce10" style:family="table-cell">
      <loext:graphic-properties draw:fill="solid" draw:fill-color="#e16173"/>
      <style:paragraph-properties fo:border-left="0.28pt solid #000000" fo:border-right="none" fo:border-top="none" fo:border-bottom="0.28pt solid #000000"/>
    </style:style>
    <style:style style:name="ce11" style:family="table-cell">
      <loext:graphic-properties draw:fill="solid" draw:fill-color="#e16173"/>
    </style:style>
    <style:style style:name="ce12" style:family="table-cell">
      <loext:graphic-properties draw:fill="solid" draw:fill-color="#e16173"/>
      <style:paragraph-properties fo:border-left="0.28pt solid #000000" fo:border-right="none" fo:border-top="0.28pt solid #000000" fo:border-bottom="0.28pt solid #000000"/>
    </style:style>
    <style:style style:name="ce13" style:family="table-cell">
      <loext:graphic-properties draw:fill="solid" draw:fill-color="#77bc65"/>
      <style:paragraph-properties fo:border-left="0.28pt solid #000000" fo:border-right="0.28pt solid #000000" fo:border-top="none" fo:border-bottom="0.28pt solid #000000"/>
    </style:style>
    <style:style style:name="ce14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102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.102cm" fo:margin-right="0cm" fo:margin-top="0.102cm" fo:margin-bottom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margin-top="0.399cm" fo:margin-bottom="0cm" fo:text-indent="0cm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use-window-font-color="true" loext:opacity="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47cm" svg:y="3.511cm" presentation:class="title" presentation:user-transformed="true">
          <draw:text-box>
            <text:p><text:span text:style-name="T1">Automatisation sur </text:span><text:span text:style-name="T1">un cluster</text:span></text:p>
          </draw:text-box>
        </draw:frame>
        <draw:frame presentation:style-name="pr2" draw:text-style-name="P2" draw:layer="layout" svg:width="12.693cm" svg:height="0.869cm" svg:x="8.255cm" svg:y="13.099cm" presentation:class="subtitle" presentation:user-transformed="true">
          <draw:text-box>
            <text:p><text:span text:style-name="T2">Lucielle Anya Alita </text:span><text:span text:style-name="T2">Ahsoka Voeffray</text:span></text:p>
          </draw:text-box>
        </draw:frame>
        <draw:frame draw:style-name="gr1" draw:text-style-name="P3" draw:layer="layout" svg:width="22.204cm" svg:height="3.717cm" svg:x="2.687cm" svg:y="7.619cm">
          <draw:image xlink:href="Pictures/10002B8700007C20000014C63E427498.svg" xlink:type="simple" xlink:show="embed" xlink:actuate="onLoad" draw:mime-type="image/svg+xml">
            <text:p/>
          </draw:image>
          <draw:image xlink:href="Pictures/10000001000004B1000000C9A3BBEE2B.png" xlink:type="simple" xlink:show="embed" xlink:actuate="onLoad" draw:mime-type="image/png"/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1.27cm" svg:x="0.634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Table des matières</text:p>
          </draw:text-box>
        </draw:frame>
        <draw:frame presentation:style-name="pr5" draw:text-style-name="P7" draw:layer="layout" svg:width="9.527cm" svg:height="9.133cm" svg:x="3.173cm" svg:y="5.47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Fonctionnement actuel</text:span></text:p>
              </text:list-item>
              <text:list-item>
                <text:p><text:span text:style-name="T5">Fonctionnement voulu</text:span></text:p>
              </text:list-item>
              <text:list-item>
                <text:p><text:span text:style-name="T5">Choix technologiques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text-style-name="P10" draw:layer="layout" svg:width="9.527cm" svg:height="9.133cm" svg:x="15.24cm" svg:y="5.472cm" presentation:class="outline" presentation:user-transformed="true">
          <draw:text-box>
            <text:list text:style-name="L2">
              <text:list-item>
                <text:p text:style-name="P8"><text:span text:style-name="T5">Conception / Réalisation</text:span></text:p>
              </text:list-item>
              <text:list-item>
                <text:p text:style-name="P8"><text:span text:style-name="T5">Problèmes rencontrés</text:span></text:p>
              </text:list-item>
              <text:list-item>
                <text:p text:style-name="P8"><text:span text:style-name="T5">Améliorations possibles</text:span></text:p>
              </text:list-item>
              <text:list-item>
                <text:p text:style-name="P8"><text:span text:style-name="T5">Réflexion critique</text:span></text:p>
              </text:list-item>
              <text:list-item>
                <text:p text:style-name="P9"><text:span text:style-name="T5">Conclusion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Fonctionnement actuel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 text:style-name="P11"><text:span text:style-name="T6">Ecole des métiers</text:span></text:p>
                <text:list>
                  <text:list-item>
                    <text:p>Cloud privé EMFNet</text:p>
                  </text:list-item>
                </text:list>
              </text:list-item>
              <text:list-item>
                <text:p text:style-name="P11"><text:span text:style-name="T6">Modules IT</text:span></text:p>
                <text:list>
                  <text:list-item>
                    <text:p text:style-name="P12"><text:span text:style-name="T7">VM Windows Server</text:span></text:p>
                  </text:list-item>
                </text:list>
              </text:list-item>
              <text:list-item>
                <text:p text:style-name="P11"><text:span text:style-name="T6">La problématique</text:span></text:p>
                <text:list>
                  <text:list-item>
                    <text:p text:style-name="P12"><text:span text:style-name="T7">Mise en place </text:span><text:span text:style-name="T7">manuelle</text:span></text:p>
                  </text:list-item>
                </text:list>
              </text:list-item>
            </text:list>
            <text:p/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7.727cm" svg:height="12.315cm" svg:x="5.125cm" svg:y="3.174cm">
          <draw:image xlink:href="Pictures/100000000000053F000003A569214397.png" xlink:type="simple" xlink:show="embed" xlink:actuate="onLoad" draw:mime-type="image/png">
            <text:p/>
          </draw:image>
        </draw:frame>
        <draw:frame presentation:style-name="pr7" draw:text-style-name="P13" draw:layer="layout" svg:width="15.875cm" svg:height="5.209cm" svg:x="6.35cm" svg:y="-0.129cm" presentation:class="title" presentation:user-transformed="true">
          <draw:text-box>
            <text:p text:style-name="P6"><text:span text:style-name="T8">Fonctionnement voulu</text:span></text:p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hoix technologiqu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nsible vs Terraform</text:p>
              </text:list-item>
              <text:list-item>
                <text:p>Stockage</text:p>
                <text:list>
                  <text:list-item>
                    <text:p>Noeuds Nutanix (10To x 3(4) noeuds)</text:p>
                  </text:list-item>
                  <text:list-item>
                    <text:p>HP Proliant (RAID obligatoir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list text:style-name="L2">
              <text:list-header>
                <text:p text:style-name="P14">Ansible vs Terraform</text:p>
              </text:list-header>
            </text:list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</text:p>
                <text:list>
                  <text:list-item>
                    <text:p text:style-name="P12">Conformité</text:p>
                  </text:list-item>
                  <text:list-item>
                    <text:p text:style-name="P12">Création de VM</text:p>
                  </text:list-item>
                  <text:list-item>
                    <text:p text:style-name="P12">installation d’OS</text:p>
                  </text:list-item>
                </text:list>
              </text:list-item>
              <text:list-item>
                <text:p>Ansible</text:p>
                <text:list>
                  <text:list-item>
                    <text:p>Configuration d’OS</text:p>
                  </text:list-item>
                  <text:list-item>
                    <text:p text:style-name="P12">Tâches</text:p>
                  </text:list-item>
                  <text:list-item>
                    <text:p>Evolutivité du proje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Décision: Ansible</text:p>
              <text:p>1. Evolutivité</text:p>
              <text:p>2. Possibilité de créer des VMs ET de les configurer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eph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6.761cm" svg:height="13.722cm" svg:x="5.715cm" svg:y="1.904cm">
          <draw:image xlink:href="Pictures/1000000000000491000003BD1CD1FC8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1 sur 2 solutions hyperconvergées</text:p>
                </text:list-item>
                <text:list-item>
                  <text:p text:style-name="P11">Recommendation de Proxmox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Réseau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4" draw:text-style-name="P3" draw:layer="layout" svg:width="18.105cm" svg:height="12.581cm" svg:x="7.239cm" svg:y="3.175cm">
          <draw:image xlink:href="Pictures/1000000000000540000003A63FB8ECC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4.664cm" svg:height="9.885cm" svg:x="1.371cm" svg:y="3.345cm">
          <draw:image xlink:href="Pictures/1000000000000694000002A317B21AF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5.854cm" svg:height="7.62cm" svg:x="1.22cm" svg:y="4.48cm">
          <draw:image xlink:href="Pictures/1000000000000696000001F10E38A72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draw:style-name="gr1" draw:text-style-name="P3" draw:layer="layout" svg:width="27.99cm" svg:height="9.727cm" svg:x="0.002cm" svg:y="3.274cm">
          <draw:image xlink:href="Pictures/100000000000054E000001D8DB4D8B4B.png" xlink:type="simple" xlink:show="embed" xlink:actuate="onLoad" draw:mime-type="image/png">
            <text:p/>
          </draw:image>
        </draw:frame>
        <draw:frame presentation:style-name="pr4" draw:layer="layout" svg:width="6.985cm" svg:height="2.629cm" svg:x="10.795cm" svg:y="1.181cm" presentation:class="title" presentation:user-transformed="true">
          <draw:text-box>
            <text:p>Proxmox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name="ddd" draw:style-name="gr1" draw:text-style-name="P3" draw:layer="layout" svg:width="1.447cm" svg:height="2.296cm" svg:x="8.89cm" svg:y="12.245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5" draw:layer="layout" svg:width="3.54cm" svg:height="1.361cm" svg:x="11.43cm" svg:y="14.605cm">
          <draw:text-box>
            <text:p><text:span text:style-name="T9">A41-SRV-02</text:span></text:p>
          </draw:text-box>
        </draw:frame>
        <draw:frame draw:style-name="gr5" draw:text-style-name="P15" draw:layer="layout" svg:width="3.54cm" svg:height="1.361cm" svg:x="14.97cm" svg:y="14.605cm">
          <draw:text-box>
            <text:p><text:span text:style-name="T9">A41-SRV-03</text:span></text:p>
          </draw:text-box>
        </draw:frame>
        <draw:frame draw:name="ddd 1" draw:style-name="gr1" draw:text-style-name="P3" draw:layer="layout" svg:width="1.447cm" svg:height="2.296cm" svg:x="12.523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name="ddd 2" draw:style-name="gr1" draw:text-style-name="P3" draw:layer="layout" svg:width="1.447cm" svg:height="2.296cm" svg:x="15.875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5" draw:layer="layout" svg:width="3.54cm" svg:height="1.361cm" svg:x="7.79cm" svg:y="14.606cm">
          <draw:text-box>
            <text:p><text:span text:style-name="T9">A41-SRV-01</text:span></text:p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Firewall</text:p>
          </draw:text-box>
        </draw:frame>
        <draw:frame draw:style-name="gr6" draw:layer="layout" svg:width="23.486cm" svg:height="8.261cm" svg:x="3.173cm" svg:y="5.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bg-none"/>
              <table:table-cell>
                <text:p><text:span text:style-name="T10">Management</text:span></text:p>
              </table:table-cell>
              <table:table-cell>
                <text:p><text:span text:style-name="T10">Stockage</text:span></text:p>
              </table:table-cell>
              <table:table-cell>
                <text:p><text:span text:style-name="T10">VMNet1</text:span></text:p>
              </table:table-cell>
              <table:table-cell>
                <text:p><text:span text:style-name="T10">VMNet2</text:span></text:p>
              </table:table-cell>
              <table:table-cell>
                <text:p><text:span text:style-name="T10">EMFnet</text:span></text:p>
              </table:table-cell>
              <table:table-cell>
                <text:p><text:span text:style-name="T10">WAN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Management</text:span></text:p>
              </table:table-cell>
              <table:table-cell table:style-name="ce3"/>
              <table:table-cell table:style-name="ce4">
                <text:p text:style-name="P16"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Stockage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7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VMNet1</text:span></text:p>
              </table:table-cell>
              <table:table-cell table:style-name="ce9">
                <text:p text:style-name="P16"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>
              <table:table-cell table:style-name="ce2">
                <text:p><text:span text:style-name="T10">VMNet2</text:span></text:p>
              </table:table-cell>
              <table:table-cell table:style-name="ce11">
                <text:p><text:span text:style-name="T11">Accès refusé</text:span></text:p>
              </table:table-cell>
              <table:table-cell table:style-name="ce12">
                <text:p><text:span text:style-name="T11">Accès refu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 table:style-name="ce5">
                <text:p><text:span text:style-name="T11">Accès Autorisé</text:span></text:p>
              </table:table-cell>
            </table:table-row>
            <table:table-row table:style-name="ro2" table:default-cell-style-name="ce13">
              <table:table-cell table:style-name="ce2">
                <text:p><text:span text:style-name="T10">EMFnet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</table:table-row>
            <table:table-row table:style-name="ro2" table:default-cell-style-name="ce14">
              <table:table-cell table:style-name="ce2">
                <text:p><text:span text:style-name="T10">WAN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5f_Default" presentation:presentation-page-layout-name="AL2T1" xml:id="id12" draw:id="id12">
        <office:forms form:automatic-focus="false" form:apply-design-mode="false"/>
        <draw:frame presentation:style-name="pr8" draw:layer="layout" svg:width="21.453cm" svg:height="2.629cm" svg:x="1.399cm" svg:y="2.539cm" presentation:class="title" presentation:user-transformed="true">
          <draw:text-box>
            <text:p>Codebase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2.061cm" svg:height="12.466cm" svg:x="10.156cm" svg:y="2.837cm">
          <draw:image xlink:href="Pictures/100000000000034A000003667418382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11.43cm" svg:height="8.681cm" svg:x="1.27cm" svg:y="-0.575cm" presentation:class="title" presentation:user-transformed="true">
          <draw:text-box>
            <text:p>Linux Container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layer="layout" svg:width="23.487cm" svg:height="9.133cm" svg:x="3.174cm" svg:y="5.471cm" presentation:class="outline" presentation:user-transformed="true">
          <draw:text-box>
            <text:list text:style-name="L2">
              <text:list-item>
                <text:p>Ansible nécessite WSL</text:p>
              </text:list-item>
              <text:list-item>
                <text:p>SITeL</text:p>
              </text:list-item>
              <text:list-item>
                <text:p>Solution: Debian LXC</text:p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Problèmes rencontré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Jointure au cluster</text:p>
              </text:list-item>
              <text:list-item>
                <text:p>Création des OSD Ceph</text:p>
              </text:list-item>
              <text:list-item>
                <text:p>Changement des IPs du cluster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5" draw:id="id1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Améliorations possibl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ffichage des VMs créées</text:p>
              </text:list-item>
              <text:list-item>
                <text:p>Gestion des adresses IPs</text:p>
              </text:list-item>
              <text:list-item>
                <text:p>Sysprep</text:p>
              </text:list-item>
              <text:list-item>
                <text:p>Automatisation de la gestion du cluster</text:p>
              </text:list-item>
              <text:list-item>
                <text:p>Distribution de la charg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17">Réflexion critique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Erreurs dans la documentation</text:p>
              </text:list-item>
              <text:list-item>
                <text:p>Compétences métier</text:p>
              </text:list-item>
              <text:list-item>
                <text:p>Standards d’entrepris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3T19" xml:id="id17" draw:id="id17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Conclusion</text:p>
          </draw:text-box>
        </draw:frame>
        <anim:par presentation:node-type="timing-root">
          <anim:par smil:begin="id1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En conclusion:</text:p>
              <text:p>- Mis en place un cluster</text:p>
              <text:p>- Automatisé son fonctionnement</text:p>
              <text:p>- Adapté aux demandes de l’EMF</text:p>
              <text:p>- Adapté aux restrictions du SITeL</text:p>
              <text:p>- Respect des Standards d’entreprise</text:p>
              <text:p>- Solution évolutive</text:p>
            </draw:text-box>
          </draw:frame>
        </presentation:notes>
      </draw:page>
      <draw:page draw:name="page19" draw:style-name="dp3" draw:master-page-name="Default" presentation:presentation-page-layout-name="AL3T19" xml:id="id18" draw:id="id1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Démonstration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xml:id="id19" draw:id="id1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Merci pour votre attention</text:p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xml:id="id20" draw:id="id20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Questions</text:p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1" draw:id="id2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Sources</text:p>
          </draw:text-box>
        </draw:frame>
        <draw:frame presentation:style-name="pr5" draw:layer="layout" svg:width="23.487cm" svg:height="9.133cm" svg:x="3.273cm" svg:y="5.47cm" presentation:class="outline" presentation:user-transformed="true">
          <draw:text-box>
            <text:list text:style-name="L2">
              <text:list-item>
                <text:p>Logo de Ansible</text:p>
                <text:list>
                  <text:list-item>
                    <text:p text:style-name="P18"><text:span text:style-name="T11">Ansible Project. (2021, April 14). Ansible logo.svg - Wikimedia Commons. https://commons.wikimedia.org/wiki/File:Ansible_logo.svg</text:span></text:p>
                  </text:list-item>
                </text:list>
              </text:list-item>
              <text:list-item>
                <text:p>Logos proxmox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Proxmox Server Solutions GmbH. (2026, June 1). Media Resources - Proxmox. </text:span><text:span text:style-name="T12"><text:a xlink:href="https://www.proxmox.com/en/about/company-details/media-kit" xlink:type="simple">https://www.proxmox.com/en/about/company-details/media-kit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efault-background" style:display-name="1_Default-background" style:family="presentation">
      <style:graphic-properties draw:stroke="none" draw:fill="none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outline2" style:display-name="1_Default-outline2" style:family="presentation" style:parent-style-name="_31__5f_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31__5f_Default-outline3" style:display-name="1_Default-outline3" style:family="presentation" style:parent-style-name="_31__5f_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31__5f_Default-outline4" style:display-name="1_Default-outline4" style:family="presentation" style:parent-style-name="_31__5f_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31__5f_Default-outline5" style:display-name="1_Default-outline5" style:family="presentation" style:parent-style-name="_31__5f_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Default-background" style:display-name="2_Default-background" style:family="presentation">
      <style:graphic-properties draw:stroke="none" draw:fill="none"/>
      <style:text-properties style:letter-kerning="true"/>
    </style:style>
    <style:style style:name="_32__5f_Default-backgroundobjects" style:display-name="2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-notes" style:display-name="2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-outline1" style:display-name="2_Default-outline1" style:family="presentation">
      <style:graphic-properties draw:stroke="none" draw:fill="none" draw:auto-grow-height="false" draw:fit-to-size="false" style:shrink-to-fit="true">
        <text:list-style style:name="_32__5f_Default-outline1" style:display-name="2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outline2" style:display-name="2_Default-outline2" style:family="presentation" style:parent-style-name="_32__5f_Default-outline1">
      <style:paragraph-properties fo:margin-top="0.4cm" fo:margin-bottom="0cm"/>
      <style:text-properties fo:font-size="28pt" style:font-size-asian="28pt" style:font-size-complex="28pt"/>
    </style:style>
    <style:style style:name="_32__5f_Default-outline3" style:display-name="2_Default-outline3" style:family="presentation" style:parent-style-name="_32__5f_Default-outline2">
      <style:paragraph-properties fo:margin-top="0.3cm" fo:margin-bottom="0cm"/>
      <style:text-properties fo:font-size="24pt" style:font-size-asian="24pt" style:font-size-complex="24pt"/>
    </style:style>
    <style:style style:name="_32__5f_Default-outline4" style:display-name="2_Default-outline4" style:family="presentation" style:parent-style-name="_32__5f_Default-outline3">
      <style:paragraph-properties fo:margin-top="0.2cm" fo:margin-bottom="0cm"/>
      <style:text-properties fo:font-size="20pt" style:font-size-asian="20pt" style:font-size-complex="20pt"/>
    </style:style>
    <style:style style:name="_32__5f_Default-outline5" style:display-name="2_Default-outline5" style:family="presentation" style:parent-style-name="_32__5f_Default-outline4">
      <style:paragraph-properties fo:margin-top="0.1cm" fo:margin-bottom="0cm"/>
      <style:text-properties fo:font-size="20pt" style:font-size-asian="20pt" style:font-size-complex="20pt"/>
    </style:style>
    <style:style style:name="_32__5f_Default-outline6" style:display-name="2_Default-outline6" style:family="presentation" style:parent-style-name="_32__5f_Default-outline5">
      <style:paragraph-properties fo:margin-top="0.1cm" fo:margin-bottom="0cm"/>
      <style:text-properties fo:font-size="20pt" style:font-size-asian="20pt" style:font-size-complex="20pt"/>
    </style:style>
    <style:style style:name="_32__5f_Default-outline7" style:display-name="2_Default-outline7" style:family="presentation" style:parent-style-name="_32__5f_Default-outline6">
      <style:paragraph-properties fo:margin-top="0.1cm" fo:margin-bottom="0cm"/>
      <style:text-properties fo:font-size="20pt" style:font-size-asian="20pt" style:font-size-complex="20pt"/>
    </style:style>
    <style:style style:name="_32__5f_Default-outline8" style:display-name="2_Default-outline8" style:family="presentation" style:parent-style-name="_32__5f_Default-outline7">
      <style:paragraph-properties fo:margin-top="0.1cm" fo:margin-bottom="0cm"/>
      <style:text-properties fo:font-size="20pt" style:font-size-asian="20pt" style:font-size-complex="20pt"/>
    </style:style>
    <style:style style:name="_32__5f_Default-outline9" style:display-name="2_Default-outline9" style:family="presentation" style:parent-style-name="_32__5f_Default-outline8">
      <style:paragraph-properties fo:margin-top="0.1cm" fo:margin-bottom="0cm"/>
      <style:text-properties fo:font-size="20pt" style:font-size-asian="20pt" style:font-size-complex="20pt"/>
    </style:style>
    <style:style style:name="_32__5f_Default-subtitle" style:display-name="2_Default-subtitle" style:family="presentation">
      <style:graphic-properties draw:stroke="none" draw:fill="none" draw:textarea-vertical-align="middle">
        <text:list-style style:name="_32__5f_Default-subtitle" style:display-name="2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title" style:display-name="2_Default-title" style:family="presentation">
      <style:graphic-properties draw:stroke="none" draw:fill="none" draw:textarea-vertical-align="middle">
        <text:list-style style:name="_32__5f_Default-title" style:display-name="2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712cm" fo:min-width="7.1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2.32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_32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.174cm" svg:height="3.175cm" svg:x="-0.029cm" svg:y="13.014cm">
        <draw:image xlink:href="Pictures/1000325F000052C9000052C9D27F875F.svg" xlink:type="simple" xlink:show="embed" xlink:actuate="onLoad" draw:mime-type="image/svg+xml">
          <text:p/>
        </draw:image>
        <draw:image xlink:href="Pictures/10000001000002C3000002C3E0EA2188.png" xlink:type="simple" xlink:show="embed" xlink:actuate="onLoad" draw:mime-type="image/png"/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-title" draw:layer="backgroundobjects" svg:width="25.191cm" svg:height="2.629cm" svg:x="1.399cm" svg:y="0.627cm" presentation:class="title" presentation:placeholder="true">
        <draw:text-box/>
      </draw:frame>
      <draw:frame presentation:style-name="_31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_31__5f_Default-title" draw:layer="backgroundobjects" svg:width="18.621cm" svg:height="10.476cm" svg:x="1.484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2__5f_Default" style:display-name="2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2__5f_Default-title" draw:layer="backgroundobjects" svg:width="25.191cm" svg:height="2.629cm" svg:x="1.399cm" svg:y="0.627cm" presentation:class="title" presentation:placeholder="true">
        <draw:text-box/>
      </draw:frame>
      <draw:frame presentation:style-name="_32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draw:frame draw:style-name="Mgr3" draw:text-style-name="MP7" draw:layer="backgroundobjects" svg:width="1.719cm" svg:height="2.114cm" svg:x="0.386cm" svg:y="13.317cm">
        <draw:image xlink:href="Pictures/10000D7000001A90000020A985658AC8.svg" xlink:type="simple" xlink:show="embed" xlink:actuate="onLoad" draw:mime-type="image/svg+xml">
          <text:p/>
        </draw:image>
        <draw:image xlink:href="Pictures/10000001000001010000013C850A5C9B.png" xlink:type="simple" xlink:show="embed" xlink:actuate="onLoad" draw:mime-type="image/png"/>
      </draw:frame>
      <presentation:notes style:page-layout-name="PM0">
        <draw:page-thumbnail draw:style-name="standard" draw:layer="backgroundobjects" svg:width="18.621cm" svg:height="10.476cm" svg:x="1.484cm" svg:y="2.123cm" presentation:class="page"/>
        <draw:frame draw:style-name="Mgr5" draw:text-style-name="MP10" draw:layer="backgroundobjects" svg:width="17.271cm" svg:height="12.572cm" svg:x="2.159cm" svg:y="13.271cm">
          <draw:text-box>
            <text:p/>
          </draw:text-box>
        </draw:frame>
        <draw:frame presentation:style-name="_32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06:16.841655568</meta:creation-date>
    <dc:date>2026-06-11T16:34:22.782521882</dc:date>
    <meta:editing-duration>PT9H17M54S</meta:editing-duration>
    <meta:editing-cycles>49</meta:editing-cycles>
    <meta:generator>LibreOffice/25.8.7.3$Linux_X86_64 LibreOffice_project/580$Build-3</meta:generator>
    <meta:document-statistic meta:object-count="168"/>
  </office:meta>
</office:document-meta>
</file>