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7.688cm" fo:min-width="2.45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8.07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73cm" fo:min-width="13.435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0.692cm" svg:height="2.772cm" draw:transform="rotate (-1.32575209981489) translate (13.5317941625756cm 2.54936408093574cm)" svg:viewBox="0 0 693 2773" draw:points="0,2773 308,1540 693,0">
          <text:p/>
        </draw:polyline>
        <draw:polyline draw:style-name="gr1" draw:text-style-name="P1" draw:layer="layout" svg:width="0.692cm" svg:height="2.772cm" draw:transform="rotate (-1.32575209981489) translate (13.5317941625756cm 5.08936408093574cm)" svg:viewBox="0 0 693 2773" draw:points="0,2773 308,1540 693,0">
          <text:p/>
        </draw:polyline>
        <draw:polyline draw:style-name="gr1" draw:text-style-name="P1" draw:layer="layout" svg:width="0.692cm" svg:height="2.772cm" draw:transform="rotate (-1.32575209981489) translate (13.5317941625756cm 7.94736408093574cm)" svg:viewBox="0 0 693 2773" draw:points="0,2773 308,1540 693,0">
          <text:p/>
        </draw:polyline>
        <draw:polyline draw:style-name="gr2" draw:text-style-name="P1" draw:layer="layout" svg:width="8.393cm" svg:height="2.002cm" draw:transform="rotate (-1.32575209981489) translate (12.3365392337894cm 3.16626107786073cm)" svg:viewBox="0 0 8394 2003" draw:points="0,1541 385,0 8394,2003">
          <text:p/>
        </draw:polyline>
        <draw:polyline draw:style-name="gr2" draw:text-style-name="P1" draw:layer="layout" svg:width="5.467cm" svg:height="1.309cm" draw:transform="rotate (-1.32575209981489) translate (11.7389117693963cm 6.17270957632322cm)" svg:viewBox="0 0 5468 1310" draw:points="0,925 231,0 5468,1310">
          <text:p/>
        </draw:polyline>
        <draw:polyline draw:style-name="gr2" draw:text-style-name="P1" draw:layer="layout" svg:width="2.54cm" svg:height="0.615cm" draw:transform="rotate (-1.32575209981489) translate (11.1412843050032cm 9.18015807478571cm)" svg:viewBox="0 0 2541 616" draw:points="0,309 77,0 2541,616">
          <text:p/>
        </draw:polyline>
        <draw:custom-shape draw:style-name="gr3" draw:text-style-name="P2" draw:layer="layout" svg:width="2.952cm" svg:height="7.938cm" svg:x="13.318cm" svg:y="2.587cm">
          <text:p text:style-name="P2">Clust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572cm" svg:height="2.223cm" svg:x="2.305cm" svg:y="8.32cm">
          <text:p text:style-name="P2">A41-SRV-0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572cm" svg:height="2.223cm" svg:x="2.305cm" svg:y="5.462cm">
          <text:p text:style-name="P2">A41-SRV-0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572cm" svg:height="2.223cm" svg:x="2.305cm" svg:y="2.587cm">
          <text:p text:style-name="P2">A41-SRV-0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935cm" svg:height="2.223cm" svg:x="2.305cm" svg:y="11.73cm">
          <text:p text:style-name="P2">Ceph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0T09:49:24.673033350</meta:creation-date>
    <dc:date>2026-06-10T10:02:15.118722948</dc:date>
    <meta:editing-duration>PT1M48S</meta:editing-duration>
    <meta:editing-cycles>1</meta:editing-cycles>
    <meta:generator>LibreOffice/25.8.7.3$Linux_X86_64 LibreOffice_project/580$Build-3</meta:generator>
    <meta:print-date>2026-06-10T10:02:28.352244173</meta:print-date>
    <meta:printed-by>PDF files</meta:printed-by>
    <meta:document-statistic meta:object-count="11"/>
  </office:meta>
</office:document-meta>
</file>